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ployee_ID</text:p>
          </table:table-cell>
          <table:table-cell table:style-name="Default" office:value-type="string" calcext:value-type="string">
            <text:p>Login_Time</text:p>
          </table:table-cell>
          <table:table-cell office:value-type="string" calcext:value-type="string">
            <text:p>IP_Addr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uccess_Failure</text:p>
          </table:table-cell>
        </table:table-row>
        <table:table-row table:style-name="ro1">
          <table:table-cell office:value-type="string" calcext:value-type="string">
            <text:p>john_doe</text:p>
          </table:table-cell>
          <table:table-cell office:value-type="time" office:time-value="PT14H43M51S" calcext:value-type="time">
            <text:p>02:43:51 PM</text:p>
          </table:table-cell>
          <table:table-cell office:value-type="string" calcext:value-type="string">
            <text:p>169.158.0.1</text:p>
          </table:table-cell>
          <table:table-cell office:value-type="string" calcext:value-type="string">
            <text:p>USA, TX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time" office:time-value="PT14H44M32S" calcext:value-type="time">
            <text:p>02:44:32 PM</text:p>
          </table:table-cell>
          <table:table-cell office:value-type="string" calcext:value-type="string">
            <text:p>10.0.0.24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time" office:time-value="PT14H44M35S" calcext:value-type="time">
            <text:p>02:44:35 PM</text:p>
          </table:table-cell>
          <table:table-cell office:value-type="string" calcext:value-type="string">
            <text:p>10.0.0.24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time" office:time-value="PT14H44M40S" calcext:value-type="time">
            <text:p>02:44:40 PM</text:p>
          </table:table-cell>
          <table:table-cell office:value-type="string" calcext:value-type="string">
            <text:p>10.0.0.24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time" office:time-value="PT14H44M42S" calcext:value-type="time">
            <text:p>02:44:42 PM</text:p>
          </table:table-cell>
          <table:table-cell office:value-type="string" calcext:value-type="string">
            <text:p>10.0.0.24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time" office:time-value="PT14H44M46S" calcext:value-type="time">
            <text:p>02:44:46 PM</text:p>
          </table:table-cell>
          <table:table-cell office:value-type="string" calcext:value-type="string">
            <text:p>10.0.0.24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time" office:time-value="PT38H44M46S" calcext:value-type="time">
            <text:p>02:44:46 PM</text:p>
          </table:table-cell>
          <table:table-cell office:value-type="string" calcext:value-type="string">
            <text:p>10.0.0.25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time" office:time-value="PT62H44M47S" calcext:value-type="time">
            <text:p>02:44:47 PM</text:p>
          </table:table-cell>
          <table:table-cell office:value-type="string" calcext:value-type="string">
            <text:p>10.0.0.25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time" office:time-value="PT86H44M48S" calcext:value-type="time">
            <text:p>02:44:48 PM</text:p>
          </table:table-cell>
          <table:table-cell office:value-type="string" calcext:value-type="string">
            <text:p>10.0.0.25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time" office:time-value="PT110H44M49S" calcext:value-type="time">
            <text:p>02:44:49 PM</text:p>
          </table:table-cell>
          <table:table-cell office:value-type="string" calcext:value-type="string">
            <text:p>10.0.0.25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time" office:time-value="PT134H44M50S" calcext:value-type="time">
            <text:p>02:44:50 PM</text:p>
          </table:table-cell>
          <table:table-cell office:value-type="string" calcext:value-type="string">
            <text:p>10.0.0.25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time" office:time-value="PT158H44M52S" calcext:value-type="time">
            <text:p>02:44:52 PM</text:p>
          </table:table-cell>
          <table:table-cell office:value-type="string" calcext:value-type="string">
            <text:p>10.0.0.26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time" office:time-value="PT182H44M53S" calcext:value-type="time">
            <text:p>02:44:53 PM</text:p>
          </table:table-cell>
          <table:table-cell office:value-type="string" calcext:value-type="string">
            <text:p>10.0.0.26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time" office:time-value="PT206H44M54S" calcext:value-type="time">
            <text:p>02:44:54 PM</text:p>
          </table:table-cell>
          <table:table-cell office:value-type="string" calcext:value-type="string">
            <text:p>10.0.0.26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time" office:time-value="PT230H44M55S" calcext:value-type="time">
            <text:p>02:44:55 PM</text:p>
          </table:table-cell>
          <table:table-cell office:value-type="string" calcext:value-type="string">
            <text:p>10.0.0.26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time" office:time-value="PT254H44M56S" calcext:value-type="time">
            <text:p>02:44:56 PM</text:p>
          </table:table-cell>
          <table:table-cell office:value-type="string" calcext:value-type="string">
            <text:p>10.0.0.26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278H44M57S" calcext:value-type="time">
            <text:p>02:44:57 PM</text:p>
          </table:table-cell>
          <table:table-cell office:value-type="string" calcext:value-type="string">
            <text:p>10.0.0.27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302H44M58S" calcext:value-type="time">
            <text:p>02:44:58 PM</text:p>
          </table:table-cell>
          <table:table-cell office:value-type="string" calcext:value-type="string">
            <text:p>10.0.0.27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326H44M59S" calcext:value-type="time">
            <text:p>02:44:59 PM</text:p>
          </table:table-cell>
          <table:table-cell office:value-type="string" calcext:value-type="string">
            <text:p>10.0.0.27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350H45M00S" calcext:value-type="time">
            <text:p>02:45:00 PM</text:p>
          </table:table-cell>
          <table:table-cell office:value-type="string" calcext:value-type="string">
            <text:p>10.0.0.27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374H45M01S" calcext:value-type="time">
            <text:p>02:45:01 PM</text:p>
          </table:table-cell>
          <table:table-cell office:value-type="string" calcext:value-type="string">
            <text:p>10.0.0.27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time" office:time-value="PT398H45M10S" calcext:value-type="time">
            <text:p>02:45:10 PM</text:p>
          </table:table-cell>
          <table:table-cell office:value-type="string" calcext:value-type="string">
            <text:p>10.0.0.28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time" office:time-value="PT422H45M11S" calcext:value-type="time">
            <text:p>02:45:11 PM</text:p>
          </table:table-cell>
          <table:table-cell office:value-type="string" calcext:value-type="string">
            <text:p>10.0.0.28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time" office:time-value="PT446H45M12S" calcext:value-type="time">
            <text:p>02:45:12 PM</text:p>
          </table:table-cell>
          <table:table-cell office:value-type="string" calcext:value-type="string">
            <text:p>10.0.0.28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time" office:time-value="PT470H45M13S" calcext:value-type="time">
            <text:p>02:45:13 PM</text:p>
          </table:table-cell>
          <table:table-cell office:value-type="string" calcext:value-type="string">
            <text:p>10.0.0.28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time" office:time-value="PT494H45M14S" calcext:value-type="time">
            <text:p>02:45:14 PM</text:p>
          </table:table-cell>
          <table:table-cell office:value-type="string" calcext:value-type="string">
            <text:p>10.0.0.28</text:p>
          </table:table-cell>
          <table:table-cell office:value-type="string" calcext:value-type="string">
            <text:p>USA, NM</text:p>
          </table:table-cell>
          <table:table-cell office:value-type="string" calcext:value-type="string">
            <text:p>Failure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3:29:20.757824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12:14:28.771643582</meta:creation-date>
    <dc:date>2026-05-21T13:38:50.155480179</dc:date>
    <meta:editing-duration>PT20M33S</meta:editing-duration>
    <meta:editing-cycles>3</meta:editing-cycles>
    <meta:generator>LibreOffice/26.2.3.2$Linux_X86_64 LibreOffice_project/620$Build-2</meta:generator>
    <meta:document-statistic meta:table-count="1" meta:cell-count="135" meta:object-count="0"/>
  </office:meta>
</office:document-meta>
</file>